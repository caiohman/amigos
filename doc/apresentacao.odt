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9000000A8C49F7E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font-size="20pt" officeooo:rsid="003e62c7" officeooo:paragraph-rsid="003e62c7" style:font-size-asian="20pt" style:font-size-complex="20pt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fo:font-size="12pt" fo:language="pt" fo:country="BR" style:font-size-asian="12pt" style:font-size-complex="12pt" style:script-type="latin"/>
    </style:style>
    <style:style style:name="P4" style:family="paragraph" style:parent-style-name="Text_20_body">
      <style:text-properties fo:language="pt" fo:country="BR" officeooo:rsid="001c535a" officeooo:paragraph-rsid="001c535a" style:script-type="latin"/>
    </style:style>
    <style:style style:name="P5" style:family="paragraph" style:parent-style-name="Text_20_body">
      <style:text-properties fo:language="pt" fo:country="BR" officeooo:rsid="0020942d" officeooo:paragraph-rsid="0020942d" style:script-type="latin"/>
    </style:style>
    <style:style style:name="P6" style:family="paragraph" style:parent-style-name="Heading_20_1">
      <style:text-properties fo:font-size="12pt" fo:language="pt" fo:country="BR" officeooo:rsid="00257e34" officeooo:paragraph-rsid="00257e34" style:font-size-asian="12pt" style:font-size-complex="12pt" style:script-type="latin"/>
    </style:style>
    <style:style style:name="P7" style:family="paragraph" style:parent-style-name="Text_20_body">
      <style:text-properties fo:font-size="12pt" fo:language="pt" fo:country="BR" officeooo:rsid="00257e34" officeooo:paragraph-rsid="003ec5e3" style:font-size-asian="12pt" style:font-size-complex="12pt" style:script-type="latin"/>
    </style:style>
    <style:style style:name="P8" style:family="paragraph" style:parent-style-name="Text_20_body">
      <style:text-properties fo:font-size="12pt" fo:language="pt" fo:country="BR" officeooo:rsid="003ec5e3" officeooo:paragraph-rsid="003ec5e3" style:font-size-asian="12pt" style:font-size-complex="12pt" style:script-type="latin"/>
    </style:style>
    <style:style style:name="P9" style:family="paragraph" style:parent-style-name="Text_20_body">
      <style:text-properties fo:font-size="12pt" fo:language="pt" fo:country="BR" officeooo:rsid="00257e34" officeooo:paragraph-rsid="00257e34" style:font-size-asian="12pt" style:font-size-complex="12pt" style:script-type="latin"/>
    </style:style>
    <style:style style:name="P10" style:family="paragraph" style:parent-style-name="Text_20_body">
      <style:text-properties fo:language="pt" fo:country="BR" officeooo:rsid="00276d8b" officeooo:paragraph-rsid="00276d8b" style:script-type="latin"/>
    </style:style>
    <style:style style:name="P11" style:family="paragraph" style:parent-style-name="Heading_20_1">
      <style:text-properties fo:font-size="12pt" fo:language="pt" fo:country="BR" officeooo:rsid="00433332" officeooo:paragraph-rsid="00433332" style:font-size-asian="12pt" style:font-size-complex="12pt" style:script-type="latin"/>
    </style:style>
    <style:style style:name="P12" style:family="paragraph" style:parent-style-name="Text_20_body">
      <style:text-properties fo:font-size="12pt" fo:language="pt" fo:country="BR" officeooo:rsid="00433332" officeooo:paragraph-rsid="00433332" style:font-size-asian="12pt" style:font-size-complex="12pt" style:script-type="latin"/>
    </style:style>
    <style:style style:name="P13" style:family="paragraph" style:parent-style-name="Text_20_body">
      <style:paragraph-properties fo:text-align="center" style:justify-single-word="false"/>
      <style:text-properties fo:font-size="11pt" fo:language="pt" fo:country="BR" officeooo:rsid="004397fa" officeooo:paragraph-rsid="004397fa" style:font-size-asian="11pt" style:font-size-complex="11pt" style:script-type="latin"/>
    </style:style>
    <style:style style:name="P14" style:family="paragraph" style:parent-style-name="Text_20_body">
      <style:text-properties fo:font-size="12pt" fo:language="pt" fo:country="BR" officeooo:rsid="002aa07c" officeooo:paragraph-rsid="002bcf17" style:font-size-asian="12pt" style:font-size-complex="12pt" style:script-type="latin"/>
    </style:style>
    <style:style style:name="P15" style:family="paragraph" style:parent-style-name="Text_20_body">
      <style:text-properties fo:font-size="12pt" fo:language="pt" fo:country="BR" fo:font-style="normal" officeooo:rsid="002c94b7" officeooo:paragraph-rsid="002bcf17" style:font-size-asian="12pt" style:font-style-asian="normal" style:font-size-complex="12pt" style:font-style-complex="normal" style:script-type="latin"/>
    </style:style>
    <style:style style:name="P16" style:family="paragraph" style:parent-style-name="Text_20_body">
      <style:text-properties fo:font-size="12pt" fo:language="pt" fo:country="BR" officeooo:rsid="002aa07c" officeooo:paragraph-rsid="002aa07c" style:font-size-asian="12pt" style:font-size-complex="12pt" style:script-type="latin"/>
    </style:style>
    <style:style style:name="P17" style:family="paragraph" style:parent-style-name="Text_20_body">
      <style:text-properties fo:font-size="12pt" fo:language="pt" fo:country="BR" officeooo:rsid="003b46bb" officeooo:paragraph-rsid="003b46bb" style:font-size-asian="12pt" style:font-size-complex="12pt" style:script-type="latin"/>
    </style:style>
    <style:style style:name="P18" style:family="paragraph" style:parent-style-name="Text_20_body">
      <style:text-properties fo:font-size="12pt" fo:language="pt" fo:country="BR" officeooo:rsid="0039cfd8" officeooo:paragraph-rsid="002aa07c" style:font-size-asian="12pt" style:font-size-complex="12pt" style:script-type="latin"/>
    </style:style>
    <style:style style:name="P19" style:family="paragraph" style:parent-style-name="Text_20_body">
      <style:text-properties fo:font-size="12pt" fo:language="pt" fo:country="BR" officeooo:rsid="0039cfd8" officeooo:paragraph-rsid="0039cfd8" style:font-size-asian="12pt" style:font-size-complex="12pt" style:script-type="latin"/>
    </style:style>
    <style:style style:name="P20" style:family="paragraph" style:parent-style-name="Text_20_body">
      <style:paragraph-properties fo:text-align="center" style:justify-single-word="false"/>
      <style:text-properties fo:font-size="11pt" fo:language="pt" fo:country="BR" officeooo:rsid="003b46bb" officeooo:paragraph-rsid="003b46bb" style:font-size-asian="11pt" style:font-size-complex="11pt" style:script-type="latin"/>
    </style:style>
    <style:style style:name="P21" style:family="paragraph" style:parent-style-name="Text_20_body">
      <style:paragraph-properties fo:text-align="left" style:justify-single-word="false"/>
      <style:text-properties fo:font-size="12pt" fo:language="pt" fo:country="BR" officeooo:rsid="0039cfd8" officeooo:paragraph-rsid="0039cfd8" style:font-size-asian="12pt" style:font-size-complex="12pt" style:script-type="latin"/>
    </style:style>
    <style:style style:name="P22" style:family="paragraph" style:parent-style-name="Text_20_body">
      <style:paragraph-properties fo:text-align="center" style:justify-single-word="false"/>
      <style:text-properties fo:font-size="12pt" fo:language="pt" fo:country="BR" officeooo:rsid="003b46bb" officeooo:paragraph-rsid="003b46bb" style:font-size-asian="12pt" style:font-size-complex="12pt" style:script-type="latin"/>
    </style:style>
    <style:style style:name="P23" style:family="paragraph" style:parent-style-name="Text_20_body">
      <style:paragraph-properties fo:text-align="center" style:justify-single-word="false"/>
      <style:text-properties fo:font-size="12pt" fo:language="pt" fo:country="BR" officeooo:rsid="002aa07c" officeooo:paragraph-rsid="003b46bb" style:font-size-asian="12pt" style:font-size-complex="12pt" style:script-type="latin"/>
    </style:style>
    <style:style style:name="P24" style:family="paragraph" style:parent-style-name="Text_20_body">
      <style:paragraph-properties fo:text-align="center" style:justify-single-word="false"/>
      <style:text-properties fo:font-size="12pt" fo:language="pt" fo:country="BR" officeooo:rsid="003d44c3" officeooo:paragraph-rsid="003d44c3" style:font-size-asian="12pt" style:font-size-complex="12pt" style:script-type="latin"/>
    </style:style>
    <style:style style:name="P25" style:family="paragraph" style:parent-style-name="Text_20_body">
      <style:text-properties fo:font-size="12pt" fo:language="pt" fo:country="BR" officeooo:rsid="0039cfd8" officeooo:paragraph-rsid="003b46bb" style:font-size-asian="12pt" style:font-size-complex="12pt" style:script-type="latin"/>
    </style:style>
    <style:style style:name="T1" style:family="text">
      <style:text-properties officeooo:rsid="003e62c7"/>
    </style:style>
    <style:style style:name="T2" style:family="text">
      <style:text-properties officeooo:rsid="003ec5e3"/>
    </style:style>
    <style:style style:name="T3" style:family="text">
      <style:text-properties officeooo:rsid="0040204f"/>
    </style:style>
    <style:style style:name="T4" style:family="text">
      <style:text-properties officeooo:rsid="0047f7c2"/>
    </style:style>
    <style:style style:name="T5" style:family="text">
      <style:text-properties officeooo:rsid="00353bd1"/>
    </style:style>
    <style:style style:name="T6" style:family="text">
      <style:text-properties officeooo:rsid="0041b52b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officeooo:rsid="0041af79"/>
    </style:style>
    <style:style style:name="T9" style:family="text">
      <style:text-properties officeooo:rsid="0041af79" fo:background-color="#666666" loext:char-shading-value="0"/>
    </style:style>
    <style:style style:name="T10" style:family="text">
      <style:text-properties officeooo:rsid="004439a8"/>
    </style:style>
    <style:style style:name="T11" style:family="text">
      <style:text-properties fo:font-style="italic" officeooo:rsid="004439a8" style:font-style-asian="italic" style:font-style-complex="italic"/>
    </style:style>
    <style:style style:name="T12" style:family="text">
      <style:text-properties fo:language="en" fo:country="US" fo:font-style="italic" officeooo:rsid="004439a8" style:font-style-asian="italic" style:font-style-complex="italic"/>
    </style:style>
    <style:style style:name="T13" style:family="text">
      <style:text-properties fo:language="en" fo:country="US" officeooo:rsid="004439a8"/>
    </style:style>
    <style:style style:name="T14" style:family="text">
      <style:text-properties officeooo:rsid="00464208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IGOS</text:p>
      <text:p text:style-name="Text_20_body"/>
      <text:p text:style-name="Text_20_body"/>
      <text:p text:style-name="Text_20_body"/>
      <text:p text:style-name="Text_20_body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Sumário</text:p>
          </text:index-title>
          <text:p text:style-name="P2"><text:a xlink:type="simple" xlink:href="#__RefHeading___Toc420_2694267172" office:name="Propósito" text:style-name="Index_20_Link" text:visited-style-name="Index_20_Link">1. Propósito<text:tab/>2</text:a></text:p>
          <text:p text:style-name="P2"><text:a xlink:type="simple" xlink:href="#__RefHeading___Toc448_2694267172" office:name="Instalação" text:style-name="Index_20_Link" text:visited-style-name="Index_20_Link">2. Instalação<text:tab/>2</text:a></text:p>
          <text:p text:style-name="P2"><text:a xlink:type="simple" xlink:href="#__RefHeading___Toc639_2694267172" office:name="Banco de Dados" text:style-name="Index_20_Link" text:visited-style-name="Index_20_Link">3. Banco de Dados<text:tab/>2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P3" text:outline-level="1"><text:bookmark-start text:name="__RefHeading___Toc420_2694267172"/>Propósito<text:bookmark-end text:name="__RefHeading___Toc420_2694267172"/></text:h>
      <text:p text:style-name="P4"><text:tab/>O objetivo do projeto é <text:span text:style-name="T1">a criação de </text:span><text:span text:style-name="T2">uma </text:span><text:span text:style-name="T1">aplicação voltada ao mapeamento dos participantes de uma grupo ou comunidade. </text:span><text:span text:style-name="T2">Entre as funcionalidades, </text:span><text:span text:style-name="T3">a que está funcionando é</text:span><text:span text:style-name="T2"> o mapeamento do anivers</text:span><text:span text:style-name="T4">ariante do dia</text:span><text:span text:style-name="T2">, </text:span><text:span text:style-name="T3">porém está em desenvolvimento o mapeamento</text:span><text:span text:style-name="T2"> da identidade de gênero dos participantes, entre outras.</text:span></text:p>
      <text:p text:style-name="P5"><text:s/></text:p>
      <text:h text:style-name="P6" text:outline-level="1"><text:bookmark-start text:name="__RefHeading___Toc448_2694267172"/>Instalação<text:bookmark-end text:name="__RefHeading___Toc448_2694267172"/></text:h>
      <text:p text:style-name="P7"><text:tab/>O projeto se encontra em desenvolvimento e, <text:span text:style-name="T5">portanto</text:span>, é necessário <text:span text:style-name="T1">uma sequência de comando para a sua execução</text:span>.</text:p>
      <text:p text:style-name="P8"><text:tab/>Primeiro, é necessário a presença de uma base de dados para armazenar os dados dos participantes. A <text:span text:style-name="T6">es</text:span>colha para o projeto foi o MySql em <text:span text:style-name="T7">container</text:span>. Para isso, foi utilizada aplicação Podman. É importante utilizar esse método, pois a aplicação procura por ele no sistema.</text:p>
      <text:p text:style-name="P8"><text:tab/>Na sequencia, necessário ter o programa cargo do <text:span text:style-name="T8">R</text:span>ust para executar a aplicação <text:span text:style-name="T8">e executar </text:span><text:span text:style-name="T9">cargo run </text:span><text:span text:style-name="T8"><text:s/>dentro da pasta /app.</text:span></text:p>
      <text:p text:style-name="P9"><text:tab/></text:p>
      <text:p text:style-name="P10"/>
      <text:h text:style-name="P11" text:outline-level="1"><text:bookmark-start text:name="__RefHeading___Toc639_2694267172"/>Banco de Dados<text:bookmark-end text:name="__RefHeading___Toc639_2694267172"/></text:h>
      <text:p text:style-name="P12"/>
      <text:p text:style-name="P12"/>
      <text:p text:style-name="P13"><draw:frame draw:style-name="fr1" draw:name="Figura1" text:anchor-type="char" svg:width="13.785cm" svg:height="4.445cm" draw:z-index="0"><draw:image xlink:href="Pictures/1000000100000209000000A8C49F7E6D.png" xlink:type="simple" xlink:show="embed" xlink:actuate="onLoad" draw:mime-type="image/png"/></draw:frame>Figura 1. Modelagem do banco de dados</text:p>
      <text:p text:style-name="P14"><text:tab/></text:p>
      <text:p text:style-name="P15"><text:tab/><text:span text:style-name="T10">As informações sobre o banco de dados então dentro da pasta </text:span><text:span text:style-name="T11">db</text:span><text:span text:style-name="T10">. Nela está contido o </text:span><text:span text:style-name="T12">script </text:span><text:span text:style-name="T10">para configurar o </text:span><text:span text:style-name="T13">container</text:span><text:span text:style-name="T10"> e as informações de DDL (</text:span><text:span text:style-name="T13">Data Definition Language</text:span><text:span text:style-name="T10">) </text:span><text:span text:style-name="T14">para modelagem da base de dados</text:span><text:span text:style-name="T10">.</text:span></text:p>
      <text:p text:style-name="P16"/>
      <text:p text:style-name="P17"><text:soft-page-break/></text:p>
      <text:p text:style-name="P16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19"/>
      <text:p text:style-name="P17"><text:span text:style-name="T15"/></text:p>
      <text:p text:style-name="P1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tab/><text:tab/><text:tab/></text:p>
      <text:p text:style-name="P19"/>
      <text:p text:style-name="P16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6"><text:s text:c="12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5"/>
      <text:p text:style-name="P25"><text:soft-page-break/></text:p>
      <text:p text:style-name="P25"/>
      <text:p text:style-name="P25"/>
      <text:p text:style-name="P25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right" style:justify-single-word="false"/>
      <style:text-properties fo:language="pt" fo:country="BR" officeooo:rsid="002edf24" officeooo:paragraph-rsid="002edf24" style:script-type="lati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ão 0.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7T18:33:56.829007323</meta:creation-date>
    <dc:date>2026-06-15T13:34:30.019859193</dc:date>
    <meta:editing-duration>PT10H6M42S</meta:editing-duration>
    <meta:editing-cycles>28</meta:editing-cycles>
    <meta:generator>LibreOffice/26.2.4.2$Linux_X86_64 LibreOffice_project/620$Build-2</meta:generator>
    <meta:print-date>2026-05-17T13:57:13.739932510</meta:print-date>
    <meta:printed-by>Arquivos PDF</meta:printed-by>
    <meta:document-statistic meta:table-count="0" meta:image-count="1" meta:object-count="0" meta:page-count="6" meta:paragraph-count="20" meta:word-count="197" meta:character-count="1186" meta:non-whitespace-character-count="983"/>
  </office:meta>
</office:document-meta>
</file>