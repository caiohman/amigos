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0A8C49F7E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20pt" officeooo:rsid="003e62c7" officeooo:paragraph-rsid="003e62c7" style:font-size-asian="20pt" style:font-size-complex="20p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fo:font-size="12pt" fo:language="pt" fo:country="BR" style:font-size-asian="12pt" style:font-size-complex="12pt" style:script-type="latin"/>
    </style:style>
    <style:style style:name="P4" style:family="paragraph" style:parent-style-name="Text_20_body">
      <style:text-properties fo:language="pt" fo:country="BR" officeooo:rsid="001c535a" officeooo:paragraph-rsid="001c535a" style:script-type="latin"/>
    </style:style>
    <style:style style:name="P5" style:family="paragraph" style:parent-style-name="Text_20_body">
      <style:text-properties fo:language="pt" fo:country="BR" officeooo:rsid="0020942d" officeooo:paragraph-rsid="0020942d" style:script-type="latin"/>
    </style:style>
    <style:style style:name="P6" style:family="paragraph" style:parent-style-name="Heading_20_1">
      <style:text-properties fo:font-size="12pt" fo:language="pt" fo:country="BR" officeooo:rsid="00257e34" officeooo:paragraph-rsid="00257e34" style:font-size-asian="12pt" style:font-size-complex="12pt" style:script-type="latin"/>
    </style:style>
    <style:style style:name="P7" style:family="paragraph" style:parent-style-name="Text_20_body">
      <style:text-properties fo:font-size="12pt" fo:language="pt" fo:country="BR" officeooo:rsid="00257e34" officeooo:paragraph-rsid="003ec5e3" style:font-size-asian="12pt" style:font-size-complex="12pt" style:script-type="latin"/>
    </style:style>
    <style:style style:name="P8" style:family="paragraph" style:parent-style-name="Text_20_body">
      <style:text-properties fo:font-size="12pt" fo:language="pt" fo:country="BR" officeooo:rsid="003ec5e3" officeooo:paragraph-rsid="003ec5e3" style:font-size-asian="12pt" style:font-size-complex="12pt" style:script-type="latin"/>
    </style:style>
    <style:style style:name="P9" style:family="paragraph" style:parent-style-name="Text_20_body">
      <style:paragraph-properties fo:text-align="left" style:justify-single-word="false"/>
      <style:text-properties fo:font-size="12pt" fo:language="pt" fo:country="BR" officeooo:rsid="00257e34" officeooo:paragraph-rsid="00257e34" style:font-size-asian="12pt" style:font-size-complex="12pt" style:script-type="latin"/>
    </style:style>
    <style:style style:name="P10" style:family="paragraph" style:parent-style-name="Text_20_body">
      <style:paragraph-properties fo:text-align="left" style:justify-single-word="false"/>
      <style:text-properties fo:font-size="11pt" fo:language="pt" fo:country="BR" officeooo:rsid="00488643" officeooo:paragraph-rsid="00257e34" style:font-size-asian="11pt" style:font-size-complex="11pt" style:script-type="latin"/>
    </style:style>
    <style:style style:name="P11" style:family="paragraph" style:parent-style-name="Text_20_body">
      <style:text-properties fo:language="pt" fo:country="BR" officeooo:rsid="00276d8b" officeooo:paragraph-rsid="00276d8b" style:script-type="latin"/>
    </style:style>
    <style:style style:name="P12" style:family="paragraph" style:parent-style-name="Heading_20_1">
      <style:text-properties fo:font-size="12pt" fo:language="pt" fo:country="BR" officeooo:rsid="00433332" officeooo:paragraph-rsid="00433332" style:font-size-asian="12pt" style:font-size-complex="12pt" style:script-type="latin"/>
    </style:style>
    <style:style style:name="P13" style:family="paragraph" style:parent-style-name="Text_20_body">
      <style:text-properties fo:font-size="12pt" fo:language="pt" fo:country="BR" officeooo:rsid="00433332" officeooo:paragraph-rsid="00433332" style:font-size-asian="12pt" style:font-size-complex="12pt" style:script-type="latin"/>
    </style:style>
    <style:style style:name="P14" style:family="paragraph" style:parent-style-name="Text_20_body">
      <style:paragraph-properties fo:text-align="center" style:justify-single-word="false"/>
      <style:text-properties fo:font-size="11pt" fo:language="pt" fo:country="BR" officeooo:rsid="004397fa" officeooo:paragraph-rsid="004397fa" style:font-size-asian="11pt" style:font-size-complex="11pt" style:script-type="latin"/>
    </style:style>
    <style:style style:name="P15" style:family="paragraph" style:parent-style-name="Text_20_body">
      <style:text-properties fo:font-size="12pt" fo:language="pt" fo:country="BR" officeooo:rsid="002aa07c" officeooo:paragraph-rsid="002bcf17" style:font-size-asian="12pt" style:font-size-complex="12pt" style:script-type="latin"/>
    </style:style>
    <style:style style:name="P16" style:family="paragraph" style:parent-style-name="Text_20_body">
      <style:text-properties fo:font-size="12pt" fo:language="pt" fo:country="BR" fo:font-style="normal" officeooo:rsid="002c94b7" officeooo:paragraph-rsid="002bcf17" style:font-size-asian="12pt" style:font-style-asian="normal" style:font-size-complex="12pt" style:font-style-complex="normal" style:script-type="latin"/>
    </style:style>
    <style:style style:name="P17" style:family="paragraph" style:parent-style-name="Text_20_body">
      <style:text-properties fo:font-size="12pt" fo:language="pt" fo:country="BR" officeooo:rsid="0039cfd8" officeooo:paragraph-rsid="002aa07c" style:font-size-asian="12pt" style:font-size-complex="12pt" style:script-type="latin"/>
    </style:style>
    <style:style style:name="P18" style:family="paragraph" style:parent-style-name="Text_20_body">
      <style:text-properties fo:font-size="12pt" fo:language="pt" fo:country="BR" officeooo:rsid="00488643" officeooo:paragraph-rsid="00488643" style:font-size-asian="12pt" style:font-size-complex="12pt" style:script-type="latin"/>
    </style:style>
    <style:style style:name="T1" style:family="text">
      <style:text-properties officeooo:rsid="003e62c7"/>
    </style:style>
    <style:style style:name="T2" style:family="text">
      <style:text-properties officeooo:rsid="003ec5e3"/>
    </style:style>
    <style:style style:name="T3" style:family="text">
      <style:text-properties officeooo:rsid="004cd143"/>
    </style:style>
    <style:style style:name="T4" style:family="text">
      <style:text-properties officeooo:rsid="0040204f"/>
    </style:style>
    <style:style style:name="T5" style:family="text">
      <style:text-properties officeooo:rsid="0047f7c2"/>
    </style:style>
    <style:style style:name="T6" style:family="text">
      <style:text-properties officeooo:rsid="00488643"/>
    </style:style>
    <style:style style:name="T7" style:family="text">
      <style:text-properties fo:font-style="italic" officeooo:rsid="00488643" style:font-style-asian="italic" style:font-style-complex="italic"/>
    </style:style>
    <style:style style:name="T8" style:family="text">
      <style:text-properties officeooo:rsid="00353bd1"/>
    </style:style>
    <style:style style:name="T9" style:family="text">
      <style:text-properties officeooo:rsid="0041b52b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officeooo:rsid="0041af79"/>
    </style:style>
    <style:style style:name="T12" style:family="text">
      <style:text-properties officeooo:rsid="0041af79" fo:background-color="#b2b2b2" loext:char-shading-value="0"/>
    </style:style>
    <style:style style:name="T13" style:family="text">
      <style:text-properties fo:font-size="11pt" officeooo:rsid="00488643" style:font-size-asian="11pt" style:font-size-complex="11pt"/>
    </style:style>
    <style:style style:name="T14" style:family="text">
      <style:text-properties fo:font-size="11pt" officeooo:rsid="00488643" fo:background-color="#b2b2b2" loext:char-shading-value="0" style:font-size-asian="11pt" style:font-size-complex="11pt"/>
    </style:style>
    <style:style style:name="T15" style:family="text">
      <style:text-properties officeooo:rsid="00492aa2"/>
    </style:style>
    <style:style style:name="T16" style:family="text">
      <style:text-properties fo:language="en" fo:country="US" fo:font-style="italic" officeooo:rsid="00492aa2" style:font-style-asian="italic" style:font-style-complex="italic"/>
    </style:style>
    <style:style style:name="T17" style:family="text">
      <style:text-properties officeooo:rsid="004ae151"/>
    </style:style>
    <style:style style:name="T18" style:family="text">
      <style:text-properties officeooo:rsid="004ae151" fo:background-color="#b2b2b2" loext:char-shading-value="0"/>
    </style:style>
    <style:style style:name="T19" style:family="text">
      <style:text-properties officeooo:rsid="004439a8"/>
    </style:style>
    <style:style style:name="T20" style:family="text">
      <style:text-properties fo:font-style="italic" officeooo:rsid="004439a8" style:font-style-asian="italic" style:font-style-complex="italic"/>
    </style:style>
    <style:style style:name="T21" style:family="text">
      <style:text-properties fo:language="en" fo:country="US" fo:font-style="italic" officeooo:rsid="004439a8" style:font-style-asian="italic" style:font-style-complex="italic"/>
    </style:style>
    <style:style style:name="T22" style:family="text">
      <style:text-properties fo:language="en" fo:country="US" officeooo:rsid="004439a8"/>
    </style:style>
    <style:style style:name="T23" style:family="text">
      <style:text-properties officeooo:rsid="004642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IGOS</text:p>
      <text:p text:style-name="Text_20_body"/>
      <text:p text:style-name="Text_20_body"/>
      <text:p text:style-name="Text_20_body"/>
      <text:p text:style-name="Text_20_body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  <text:p text:style-name="P2"><text:a xlink:type="simple" xlink:href="#__RefHeading___Toc420_2694267172" office:name="Propósito" text:style-name="Index_20_Link" text:visited-style-name="Index_20_Link">1. Propósito<text:tab/>2</text:a></text:p>
          <text:p text:style-name="P2"><text:a xlink:type="simple" xlink:href="#__RefHeading___Toc448_2694267172" office:name="Instalação" text:style-name="Index_20_Link" text:visited-style-name="Index_20_Link">2. Instalação<text:tab/>2</text:a></text:p>
          <text:p text:style-name="P2"><text:a xlink:type="simple" xlink:href="#__RefHeading___Toc639_2694267172" office:name="Banco de Dados" text:style-name="Index_20_Link" text:visited-style-name="Index_20_Link">3. Banco de Dados<text:tab/>2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3" text:outline-level="1"><text:bookmark-start text:name="__RefHeading___Toc420_2694267172"/>Propósito<text:bookmark-end text:name="__RefHeading___Toc420_2694267172"/></text:h>
      <text:p text:style-name="P4"><text:tab/>O objetivo do projeto é <text:span text:style-name="T1">a criação de </text:span><text:span text:style-name="T2">uma </text:span><text:span text:style-name="T1">aplicação voltada ao mapeamento dos participantes de uma grupo ou comunidade </text:span><text:span text:style-name="T3">e a criação de uma pequena rede social</text:span><text:span text:style-name="T1">. </text:span><text:span text:style-name="T2">Entre as funcionalidades, </text:span><text:span text:style-name="T4">a que está funcionando é</text:span><text:span text:style-name="T2"> o mapeamento do anivers</text:span><text:span text:style-name="T5">ariante do dia</text:span><text:span text:style-name="T2">, </text:span><text:span text:style-name="T4">porém está em desenvolvimento o mapeamento</text:span><text:span text:style-name="T2"> da identidade de gênero dos participantes, entre outras.</text:span></text:p>
      <text:p text:style-name="P4"><text:tab/><text:span text:style-name="T6">O projeto contará com uma versão para dispositivos móveis, uma versão para computadores pessoais e uma versão para a </text:span><text:span text:style-name="T7">web</text:span><text:span text:style-name="T6">.</text:span></text:p>
      <text:p text:style-name="P5"><text:s/></text:p>
      <text:h text:style-name="P6" text:outline-level="1"><text:bookmark-start text:name="__RefHeading___Toc448_2694267172"/>Instalação<text:bookmark-end text:name="__RefHeading___Toc448_2694267172"/></text:h>
      <text:p text:style-name="P7"><text:tab/>O projeto se encontra em desenvolvimento e, <text:span text:style-name="T8">portanto</text:span>, é necessário <text:span text:style-name="T1">uma sequência de comando para a sua execução</text:span>.</text:p>
      <text:p text:style-name="P8"><text:tab/>Primeiro, é necessário a presença de uma base de dados para armazenar os dados dos participantes. A <text:span text:style-name="T9">es</text:span>colha para o projeto foi o MySql em <text:span text:style-name="T10">container</text:span>. Para isso, foi utilizada aplicação <text:span text:style-name="T6">a </text:span><text:s/>Podman. É importante utilizar esse método, pois a aplicação procura por ele no sistema.</text:p>
      <text:p text:style-name="P8"><text:tab/>Na sequencia, necessário ter o programa cargo do <text:span text:style-name="T11">R</text:span>ust para executar a aplicação <text:span text:style-name="T11">e executar </text:span><text:span text:style-name="T12">cargo run </text:span><text:span text:style-name="T11"><text:s/>dentro da pasta /app.</text:span></text:p>
      <text:p text:style-name="P9"><text:span text:style-name="T6"><text:tab/>Para o processo de instalação do flutter e o SDK Android tem um documento que descreve passo-a-passo o processo [1]. </text:span><text:span text:style-name="T13">Após tudo instalado, basta executar o comando </text:span><text:span text:style-name="T14">flutter run -d &lt;device&gt;</text:span><text:span text:style-name="T13"> <text:s/>.</text:span></text:p>
      <text:p text:style-name="P10"><text:tab/><text:span text:style-name="T15">Para finalizar, é necessário executar o </text:span><text:span text:style-name="T16">backend</text:span><text:span text:style-name="T15"> da aplicação. </text:span><text:span text:style-name="T17">Para isso, é necessário executar o comando </text:span><text:span text:style-name="T18">dotnet run</text:span><text:span text:style-name="T17">.</text:span></text:p>
      <text:p text:style-name="P10"/>
      <text:p text:style-name="P11"/>
      <text:h text:style-name="P12" text:outline-level="1"><text:bookmark-start text:name="__RefHeading___Toc639_2694267172"/>Banco de Dados<text:bookmark-end text:name="__RefHeading___Toc639_2694267172"/></text:h>
      <text:p text:style-name="P13"/>
      <text:p text:style-name="P13"/>
      <text:p text:style-name="P14"><draw:frame draw:style-name="fr1" draw:name="Figura1" text:anchor-type="char" svg:width="13.785cm" svg:height="4.445cm" draw:z-index="0"><draw:image xlink:href="Pictures/1000000100000209000000A8C49F7E6D.png" xlink:type="simple" xlink:show="embed" xlink:actuate="onLoad" draw:mime-type="image/png"/></draw:frame><text:soft-page-break/>Figura 1. Modelagem do banco de dados</text:p>
      <text:p text:style-name="P15"><text:tab/></text:p>
      <text:p text:style-name="P16"><text:span text:style-name="T19"><text:tab/>As informações sobre o banco de dados então dentro da pasta </text:span><text:span text:style-name="T20">db</text:span><text:span text:style-name="T19">. Nela está contido o </text:span><text:span text:style-name="T21">script </text:span><text:span text:style-name="T19">para configurar o </text:span><text:span text:style-name="T22">container</text:span><text:span text:style-name="T19"> e as informações de DDL (</text:span><text:span text:style-name="T22">Data Definition Language</text:span><text:span text:style-name="T19">) </text:span><text:span text:style-name="T23">para modelagem da base de dados</text:span><text:span text:style-name="T19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[1] <text:a xlink:type="simple" xlink:href="https://github.com/caiohman/Documentation/blob/main/flutter/flutter.pdf" text:style-name="Internet_20_link" text:visited-style-name="Visited_20_Internet_20_Link">https://github.com/caiohman/Documentation/blob/main/flutter/flutter.pdf</text:a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  <style:text-properties fo:language="pt" fo:country="BR" officeooo:rsid="002edf24" officeooo:paragraph-rsid="002edf24" style:script-type="lati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ão 0.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7T18:33:56.829007323</meta:creation-date>
    <dc:date>2026-06-22T15:28:07.260510364</dc:date>
    <meta:editing-duration>PT10H11M58S</meta:editing-duration>
    <meta:editing-cycles>31</meta:editing-cycles>
    <meta:generator>LibreOffice/26.2.4.2$Linux_X86_64 LibreOffice_project/620$Build-2</meta:generator>
    <meta:print-date>2026-05-17T13:57:13.739932510</meta:print-date>
    <meta:printed-by>Arquivos PDF</meta:printed-by>
    <meta:document-statistic meta:table-count="0" meta:image-count="1" meta:object-count="0" meta:page-count="3" meta:paragraph-count="21" meta:word-count="278" meta:character-count="1716" meta:non-whitespace-character-count="1447"/>
  </office:meta>
</office:document-meta>
</file>